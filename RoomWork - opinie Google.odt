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top="0cm" fo:margin-bottom="0.499cm"/>
    </style:style>
    <style:style style:name="P2" style:family="paragraph" style:parent-style-name="Standard">
      <style:paragraph-properties fo:margin-top="0cm" fo:margin-bottom="0cm"/>
    </style:style>
    <style:style style:name="P3" style:family="paragraph" style:parent-style-name="Text_20_body">
      <style:paragraph-properties fo:margin-top="0cm" fo:margin-bottom="0cm"/>
    </style:style>
    <style:style style:name="P4" style:family="paragraph" style:parent-style-name="Standard">
      <style:paragraph-properties fo:margin-top="0cm" fo:margin-bottom="0.499cm"/>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bookmark text:name="reviews"/><text:a xlink:type="simple" xlink:href="https://www.google.com/maps/contrib/113566041621689247328?hl=pl" office:target-frame-name="_blank" xlink:show="new" text:style-name="Internet_20_link" text:visited-style-name="Visited_20_Internet_20_Link">Alina Voda</text:a>2 miesiące temu na stronie Google</text:p>
      <text:p text:style-name="Standard">5/5</text:p>
      <text:p text:style-name="Standard">Pobyt w tym hostelu oceniam na 5/5. Dobra cena, ładne pokoje, czyste, dość wygodne i przytulne. Chciałabym również wyrazić wdzięczność właścicielowi - wspaniały, życzliwy człowiek, zawsze chętny do kontaktu i owocnej współpracy. Jeśli będziemy potrzebować noclegu w tej okolicy, na pewno tu wrócimy. POLECAM!!! ;)</text:p>
      <text:p text:style-name="Standard">Pokoje5,0</text:p>
      <text:p text:style-name="Standard">Obsługa5,0</text:p>
      <text:p text:style-name="Standard">Lokalizacja5,0</text:p>
      <text:p text:style-name="P1">Odpowiedź właściciela miesiąc temu</text:p>
      <text:p text:style-name="Text_20_body">Dzień dobry Pani Alino,</text:p>
      <text:p text:style-name="Text_20_body">na wstępie chciałbym podziękować za 5 gwiazdek. Cieszymy się, że sprostaliśmy oczekiwaniom. Pochwała również należy się dla Państwa ekipy, gdyż pobyt w naszych Pokojach do wynajęcia wspominam fantastycznie, bez żadnych konfliktów. Ponad to, rozmowy i ustalenia z Panią Aliną przebiegały zawsze w prze miłej atmosferze i były realizowane w 100%. Współpraca z Państwem była czystą przyjemnością.</text:p>
      <text:p text:style-name="Text_20_body">RoomWork - Kwatery dla pracowników do wynajęcia w Słomnikach.</text:p>
      <text:p text:style-name="Text_20_body"/>
      <text:p text:style-name="P3"><text:a xlink:type="simple" xlink:href="https://www.google.com/maps/contrib/110850163332835961748?hl=pl" office:target-frame-name="_blank" xlink:show="new" text:style-name="Internet_20_link" text:visited-style-name="Visited_20_Internet_20_Link">GIORGI GOCHASHVILI</text:a>6 miesięcy temu na stronie <text:s/>Google</text:p>
      <text:p text:style-name="P3">5/5</text:p>
      <text:p text:style-name="P3">Pokoje5,0</text:p>
      <text:p text:style-name="P3">Obsługa5,0</text:p>
      <text:p text:style-name="P3">Lokalizacja5,0</text:p>
      <text:p text:style-name="Text_20_body">Odpowiedź właściciela miesiąc temu</text:p>
      <text:p text:style-name="Text_20_body">Cześć Giorgi,</text:p>
      <text:p text:style-name="Text_20_body">bardzo dziękuję za najwyższą opinie. Cieszymy się, że pobyt w naszych kwaterach był dla Ciebie na tyle dobry, że postanowiłeś nagrodzić nas największą ilością gwiazdek.</text:p>
      <text:p text:style-name="Text_20_body">RoomWork - Pokoje do wynajęcia dla pracowników i nie tylko</text:p>
      <text:p text:style-name="Text_20_body"/>
      <text:p text:style-name="P3"><text:a xlink:type="simple" xlink:href="https://www.google.com/maps/contrib/112619331425871964653?hl=pl" office:target-frame-name="_blank" xlink:show="new" text:style-name="Internet_20_link" text:visited-style-name="Visited_20_Internet_20_Link">Андрій Габрук</text:a>6 miesięcy temu na stronie <text:s/>Google</text:p>
      <text:p text:style-name="P3">5/5</text:p>
      <text:p text:style-name="P3">(Przetłumaczone przez Google) bardzo dobry<text:line-break/>(Wersja oryginalna)<text:line-break/>very good</text:p>
      <text:p text:style-name="P3">Pokoje5,0</text:p>
      <text:p text:style-name="P3">Obsługa5,0</text:p>
      <text:p text:style-name="P3">Lokalizacja5,0</text:p>
      <text:p text:style-name="Text_20_body">Odpowiedź właściciela miesiąc temu</text:p>
      <text:p text:style-name="Text_20_body">Bardzo dziękujemy!</text:p>
      <text:p text:style-name="Text_20_body">RoomWork.pl - Pokoje do wynajęcia dla ekip budowlanych</text:p>
      <text:p text:style-name="Text_20_body"/>
      <text:p text:style-name="P3"><text:a xlink:type="simple" xlink:href="https://www.google.com/maps/contrib/107938614631100515265?hl=pl" office:target-frame-name="_blank" xlink:show="new" text:style-name="Internet_20_link" text:visited-style-name="Visited_20_Internet_20_Link">Grzegorz Hnat</text:a>7 miesięcy temu na stronie <text:s/>Google</text:p>
      <text:p text:style-name="P3">5/5</text:p>
      <text:p text:style-name="P3">Pokoje5,0</text:p>
      <text:p text:style-name="P3">Obsługa5,0</text:p>
      <text:p text:style-name="P3">Lokalizacja5,0</text:p>
      <text:p text:style-name="Text_20_body"><text:soft-page-break/>Odpowiedź właściciela miesiąc temu</text:p>
      <text:p text:style-name="Text_20_body">Dzień dobry Panie Grzegorzu,</text:p>
      <text:p text:style-name="Text_20_body">dziękujemy za 5 gwiazdek. W razie potrzeby ponownego wynajęcia pokoju dla siebie lub swoich pracowników, wystarczy zadzwonić.</text:p>
      <text:p text:style-name="Text_20_body">RoomWork - Kwatery pracownicze w Słomnikach do wynajęcia</text:p>
      <text:p text:style-name="Text_20_body"/>
      <text:p text:style-name="P3"><text:a xlink:type="simple" xlink:href="https://www.google.com/maps/contrib/110515049646040508287?hl=pl" office:target-frame-name="_blank" xlink:show="new" text:style-name="Internet_20_link" text:visited-style-name="Visited_20_Internet_20_Link">Swight</text:a>8 miesięcy temu na stronie <text:s/>Google</text:p>
      <text:p text:style-name="P3">5/5</text:p>
      <text:p text:style-name="Text_20_body">Odpowiedź właścicielamiesiąc temu</text:p>
      <text:p text:style-name="Text_20_body">Dziękujemy i zapraszamy ponownie!</text:p>
      <text:p text:style-name="Text_20_body">RoomWork - Pokoje do wynajęcia w Słomnikach</text:p>
      <text:p text:style-name="Text_20_body"/>
      <text:p text:style-name="P3"><text:a xlink:type="simple" xlink:href="https://www.google.com/maps/contrib/114696310389234636325?hl=pl" office:target-frame-name="_blank" xlink:show="new" text:style-name="Internet_20_link" text:visited-style-name="Visited_20_Internet_20_Link">mateusz skorupa</text:a>11 miesięcy temu na stronie <text:s/>Google</text:p>
      <text:p text:style-name="P3">5/5</text:p>
      <text:p text:style-name="P3">Właściciel bardzo pomocny, ceny są standardowe ogólnie bardzo dobrze wspominam pobyt</text:p>
      <text:p text:style-name="Text_20_body">Odpowiedź właściciela miesiąc temu</text:p>
      <text:p text:style-name="Text_20_body">Cześć Mateusz,</text:p>
      <text:p text:style-name="Text_20_body">dokładamy wszelkich starań, żeby czas spędzony w naszych kwaterach pracowniczych w Słomnikach przebiegał miło i komfortowo. Dziękuje za wysoką opinię i miłe słowa.</text:p>
      <text:p text:style-name="Text_20_body">Serdecznie zapraszamy do ponownego odwiedzenia nas w</text:p>
      <text:p text:style-name="Text_20_body">RoomWork - Kwatery pracownicze do wynajęcia w Słomnikach.</text:p>
      <text:p text:style-name="Text_20_body"/>
      <text:p text:style-name="P3"><text:a xlink:type="simple" xlink:href="https://www.google.com/maps/contrib/114563226666517237758?hl=pl" office:target-frame-name="_blank" xlink:show="new" text:style-name="Internet_20_link" text:visited-style-name="Visited_20_Internet_20_Link">simon qurtiashvili</text:a>rok temu na stronie <text:s/>Google</text:p>
      <text:p text:style-name="P3">5/5</text:p>
      <text:p text:style-name="P2"><text:bookmark text:name="reviews1"/>კარგი ჰოსტელია ყველაფერი ნორმის ფარგლებშია. საკმაოდ წყნარი და მყუდრო ადგილია. მეპატრონე კეთილი სტუმართმოყვარე ყურადღებიანი პიროვნებაა. </text:p>
      <text:p text:style-name="Text_20_body">Dzień dobry Simon,</text:p>
      <text:p text:style-name="Text_20_body">dzięki za wysoką opinie i zapraszamy ponownie do naszych pokoi do wynajęcia w Słomnikach.</text:p>
      <text:p text:style-name="Text_20_body">Do zobaczenia !</text:p>
      <text:p text:style-name="Text_20_body">RoomWork - Kwatery pracownicze w Słomnikach</text:p>
      <text:p text:style-name="Text_20_body"/>
      <text:p text:style-name="P3"><text:a xlink:type="simple" xlink:href="https://www.google.com/maps/contrib/112392498501693747242?hl=pl" office:target-frame-name="_blank" xlink:show="new" text:style-name="Internet_20_link" text:visited-style-name="Visited_20_Internet_20_Link">Agata Hankus</text:a>rok temu na stronie <text:s/>Google</text:p>
      <text:p text:style-name="P3">5/5</text:p>
      <text:p text:style-name="P3">Dogodna lokalizacja,pokoje zadbane właściciel prze miły gość…polecam z serducha…</text:p>
      <text:p text:style-name="P3">Pokoje5,0</text:p>
      <text:p text:style-name="P3">Obsługa5,0</text:p>
      <text:p text:style-name="P3">Lokalizacja5,0</text:p>
      <text:p text:style-name="Text_20_body">Odpowiedź właściciela rok temu</text:p>
      <text:p text:style-name="Text_20_body">Dzień dobry Pani Agato,</text:p>
      <text:p text:style-name="Text_20_body">dziękujemy za wspaniałą opinię i tak miłe słowa! Cieszymy się, że pobyt w RoomWork - kwatery pracownicze Słomniki spełnił Pani oczekiwania.</text:p>
      <text:p text:style-name="Text_20_body">Zapraszamy ponownie do naszych pokoi do wynajęcia podczas następnym wizyt w Słomnikach.</text:p>
      <text:p text:style-name="Text_20_body"><text:soft-page-break/></text:p>
      <text:p text:style-name="P3"><text:a xlink:type="simple" xlink:href="https://www.google.com/maps/contrib/110435686111063526226?hl=pl" office:target-frame-name="_blank" xlink:show="new" text:style-name="Internet_20_link" text:visited-style-name="Visited_20_Internet_20_Link">Neal Kent</text:a>rok temu na stronie <text:s/>Google</text:p>
      <text:p text:style-name="P3">5/5</text:p>
      <text:p text:style-name="P3">Czysto, tanio, dobrze. Dzięki śliczne.</text:p>
      <text:p text:style-name="P3">Pokoje5,0</text:p>
      <text:p text:style-name="P3">Obsługa5,0</text:p>
      <text:p text:style-name="P3">Lokalizacja4,0</text:p>
      <text:p text:style-name="Text_20_body">Odpowiedź właściciela rok temu</text:p>
      <text:p text:style-name="Text_20_body">Dzień dobry Panie Neal,</text:p>
      <text:p text:style-name="Text_20_body">dziękujemy za 5 gwiazdek! Mamy nadzieję, że RoomWork - komfortowe kwatery pracownicze Słomniki były dla Państwa dobrym wyborem na czas pracy. Zapraszamy na dłuższy pobyt w przyszłości!</text:p>
      <text:p text:style-name="Text_20_body"/>
      <text:p text:style-name="P3"><text:a xlink:type="simple" xlink:href="https://www.google.com/maps/contrib/104902955788402787277?hl=pl" office:target-frame-name="_blank" xlink:show="new" text:style-name="Internet_20_link" text:visited-style-name="Visited_20_Internet_20_Link">Vitalii</text:a>rok temu na stronie <text:s/>Google</text:p>
      <text:p text:style-name="P3">5/5</text:p>
      <text:p text:style-name="P3">Pokoje5,0</text:p>
      <text:p text:style-name="P3">Obsługa5,0</text:p>
      <text:p text:style-name="P3">Lokalizacja5,0</text:p>
      <text:p text:style-name="Text_20_body">Odpowiedź właściciela rok temu</text:p>
      <text:p text:style-name="Text_20_body">Dzień dobry Panie Vitalii,</text:p>
      <text:p text:style-name="Text_20_body">cieszymy się, że nasz obiekt RoomWork - pokoje do wynajęcia Słomniki spełnił Pana oczekiwania. Zapraszamy serdecznie przy kolejnej wizycie w Słomnikach!</text:p>
      <text:p text:style-name="Text_20_body"/>
      <text:p text:style-name="Standard"><text:bookmark text:name="reviews3"/><text:a xlink:type="simple" xlink:href="https://www.google.com/maps/contrib/104077813372081419047?hl=pl" office:target-frame-name="_blank" xlink:show="new" text:style-name="Internet_20_link" text:visited-style-name="Visited_20_Internet_20_Link">boss ide</text:a>rok temu na stronie Google</text:p>
      <text:p text:style-name="Standard">1/5</text:p>
      <text:p text:style-name="Standard">Właściciel w porządku. Ale pokoje średnie kuchnia to dramat dawno nie widział sprzątania</text:p>
      <text:p text:style-name="Standard">Pokoje1,0</text:p>
      <text:p text:style-name="Standard">Obsługa1,0</text:p>
      <text:p text:style-name="Standard">Lokalizacja1,0</text:p>
      <text:p text:style-name="P1">Odpowiedź właściciela rok temu</text:p>
      <text:p text:style-name="Text_20_body">Dziękujemy za opinię, natomiast całkowicie się z nią nie zgadzamy.</text:p>
      <text:p text:style-name="Text_20_body">Prosimy o kontakt telefoniczny lub mailowy, abyśmy mogli wyjaśnić sytuację i podjąć odpowiednie działania. Zależy nam na tym, aby każdy nasz Gość był zadowolony. </text:p>
      <text:p text:style-name="Text_20_body">Dokładamy wszelkich starań, aby utrzymać wysokie standardy czystości w naszej kuchni. Rozumiemy jednak, że oczekiwania naszych Gości dotyczące wyposażenia i aranżacji mogą się różnić.</text:p>
      <text:p text:style-name="Text_20_body">RoomWork – Kwatery pracownicze / Pokoje do wynajęcia w Słomnikach.</text:p>
      <text:p text:style-name="Text_20_body"/>
      <text:p text:style-name="Standard"><text:bookmark text:name="reviews4"/><text:a xlink:type="simple" xlink:href="https://www.google.com/maps/contrib/100859264712712638042?hl=pl" office:target-frame-name="_blank" xlink:show="new" text:style-name="Internet_20_link" text:visited-style-name="Visited_20_Internet_20_Link">Rohit Thagunna</text:a>rok temu na stronie <text:s/>Google</text:p>
      <text:p text:style-name="Standard">5/5</text:p>
      <text:p text:style-name="Standard">Pokoje5,0</text:p>
      <text:p text:style-name="Standard">Obsługa5,0</text:p>
      <text:p text:style-name="Standard">Lokalizacja5,0</text:p>
      <text:p text:style-name="Text_20_body"/>
      <text:p text:style-name="Text_20_body"/>
      <text:p text:style-name="P3"><text:soft-page-break/><text:a xlink:type="simple" xlink:href="https://www.google.com/maps/contrib/109624500923448539908?hl=pl" office:target-frame-name="_blank" xlink:show="new" text:style-name="Internet_20_link" text:visited-style-name="Visited_20_Internet_20_Link">Dzmitry Davydzik</text:a>2 lata temu na stronie <text:s/>Google</text:p>
      <text:p text:style-name="P3">5/5</text:p>
      <text:p text:style-name="P2"><text:bookmark text:name="reviews2"/>Recenzja mieszkania dla pracowników:<text:line-break/>Mieszkanie dla pracowników, które miałem okazję wynająć, miało swoje plusy i minusy. Na początek, chciałbym podkreślić uprzejmość właściciela mieszkania. Był bardzo pomocny i zawsze dostępny, gdy mieliśmy jakiekolwiek pytania czy problemy. To zdecydowanie wielki plus, który warto docenić.<text:line-break/>Kolejnym pozytywnym aspektem było dostępne miejsce parkingowe. Wiedziałem, że zawsze mogę zaparkować mój samochód bez problemu, co jest istotne dla osób korzystających z prywatnego środka transportu.<text:line-break/>Ważnym atutem było również to, że każdy pokój miał swoją własną toaletę i prysznic. To zapewniało większą prywatność i wygodę dla mieszkańców. Ponadto, w hostelu znajdowała się jedna duża pralka oraz suszarka, co było bardzo praktyczne dla naszych codziennych potrzeb.<text:line-break/>Innym pozytywnym elementem była możliwość korzystania z terenu z miejscem do grillowania. To świetna opcja, zwłaszcza w cieplejszych miesiącach, gdy można było spędzać czas na świeżym powietrzu i delektować się grillowanymi potrawami.<text:line-break/>Niestety, jedną z wad tego mieszkania była jego bliskość do drogi. Choć nie była ona bardzo głośna, nadal było słychać pewne odgłosy. Jednak nie było to na tyle uciążliwe, aby znacząco wpływało na nasze codzienne funkcjonowanie.<text:line-break/>Inną wadą było to, że pokoje miały łóżka piętrowe, ale nie wszystkie. Dla niektórych z nas to była niewielka niedogodność, ale ogólnie nie stanowiło to dużego problemu.<text:line-break/>Jeśli chodzi o aspekty neutralne, warto wspomnieć, że w hostelu były dwie kuchnie. Jedna była wygodna i duża, a druga mała i mniej funkcjonalna. To zależało od wyboru i dostępności, ale dobrze było, obie kuchnie były równie dobrze wyposażone.<text:line-break/>W większości pokoi przeprowadzono nowy remont, co było zauważalne i doceniane. To dawało mieszkanie świeży i nowoczesny wygląd.<text:line-break/>Podsumowując, mieszkanie dla pracowników miało wiele zalet, takich jak uprzejmy właściciel, dostęp do parkingu, osobne łazienki w pokojach, pralka i suszarka, oraz możliwość grillowania. Natomiast aspekty neutralne dotyczyły dwóch kuchni o różnym poziomie wygody.<text:line-break/>Oraz remontu w większości pokoi. Ogólnie rzecz biorąc, było to komfortowe i praktyczne miejsce do zamieszkania dla pracowników.</text:p>
      <text:p text:style-name="P2"/>
      <text:p text:style-name="Text_20_body">Odpowiedź właściciela 2 lata temu</text:p>
      <text:p text:style-name="Text_20_body">Dzmitry,</text:p>
      <text:p text:style-name="Text_20_body">bardzo dziękuje za aż tak wspaniałe słowa. Cieszę się że spędzony czas w naszych kwaterach był miły i przyjemny. Był taki, ponieważ Ekipa z EnergyBud Sp. z o.o. również dbała o to. Lokatorzy utrzymywali czystość w pokojach i pomieszczeniach ogólnych, nie zakłócali ciszy nocnej dzięki czemu inni mogli spokojnie odpoczywać.</text:p>
      <text:p text:style-name="Text_20_body">Jeżeli będziecie mieli jeszcze zlecenie w okolicy, dzwońcie śmiało!</text:p>
      <text:p text:style-name="Text_20_body">Serdecznie pozdrawiam</text:p>
      <text:p text:style-name="Text_20_body">Tomasz</text:p>
      <text:p text:style-name="Text_20_body"/>
      <text:p text:style-name="P3"><text:a xlink:type="simple" xlink:href="https://www.google.com/maps/contrib/102662565449590172846?hl=pl" office:target-frame-name="_blank" xlink:show="new" text:style-name="Internet_20_link" text:visited-style-name="Visited_20_Internet_20_Link">Rati Gurgenidze</text:a>3 lata temu na stronie <text:s/>Google</text:p>
      <text:p text:style-name="P3">5/5</text:p>
      <text:p text:style-name="P3">(Przetłumaczone przez Google) Dobre miejsce ? świetni właściciele ?<text:line-break/>(Wersja oryginalna)<text:line-break/>Good place ? excellent owners ?</text:p>
      <text:p text:style-name="Text_20_body">Odpowiedź właściciela 3 lata temu</text:p>
      <text:p text:style-name="Text_20_body">Rati Gurgenidze dziękujemy za przemiłe słowa. Zapraszamy ponownie !!</text:p>
      <text:p text:style-name="Text_20_body"><text:soft-page-break/></text:p>
      <text:p text:style-name="P3"><text:a xlink:type="simple" xlink:href="https://www.google.com/maps/contrib/116129171858612328678?hl=pl" office:target-frame-name="_blank" xlink:show="new" text:style-name="Internet_20_link" text:visited-style-name="Visited_20_Internet_20_Link">Oleksandr Sukhetskyi</text:a>3 lata temu na stronie <text:s/>Google</text:p>
      <text:p text:style-name="P3">5/5</text:p>
      <text:p text:style-name="P3">Dobry hostel w przystępnej cenie. W każdym pokoju znajduje się prysznic.</text:p>
      <text:p text:style-name="Text_20_body">Odpowiedź właściciela 3 lata temu</text:p>
      <text:p text:style-name="Text_20_body">Sasha dziękujemy za 5 gwiazdek! Zapraszamy ponownie :)</text:p>
      <text:p text:style-name="Text_20_body"/>
      <text:p text:style-name="P3"><text:a xlink:type="simple" xlink:href="https://www.google.com/maps/contrib/116577962872232613489?hl=pl" office:target-frame-name="_blank" xlink:show="new" text:style-name="Internet_20_link" text:visited-style-name="Visited_20_Internet_20_Link">Damian Sli</text:a>3 lata temu na stronie <text:s/>Google</text:p>
      <text:p text:style-name="P3">5/5</text:p>
      <text:p text:style-name="P3">Miło czysto i przyjemnie .</text:p>
      <text:p text:style-name="Text_20_body">Odpowiedź właściciela 3 lata temu</text:p>
      <text:p text:style-name="Text_20_body">Dziękujemy za 5 gwiazdek. Zapraszamy ponownie. Do zobaczenia :)</text:p>
      <text:p text:style-name="Text_20_body"/>
      <text:p text:style-name="P3"><text:a xlink:type="simple" xlink:href="https://www.google.com/maps/contrib/102442188923459660698?hl=pl" office:target-frame-name="_blank" xlink:show="new" text:style-name="Internet_20_link" text:visited-style-name="Visited_20_Internet_20_Link">Adi Yolo</text:a>3 lata temu na stronie <text:s/>Google</text:p>
      <text:p text:style-name="P3">5/5</text:p>
      <text:p text:style-name="P3">Sprawdzone miejsce, polecam z pełnym przekonaniem!</text:p>
      <text:p text:style-name="Text_20_body">Odpowiedź właściciela3 lata temu</text:p>
      <text:p text:style-name="Text_20_body">Dziękujemy za 5 gwiazdek. Zapraszamy ponownie. Do zobaczenia</text:p>
      <text:p text:style-name="Text_20_body"/>
      <text:p text:style-name="P3"><text:a xlink:type="simple" xlink:href="https://www.google.com/maps/contrib/100285500583569731517?hl=pl" office:target-frame-name="_blank" xlink:show="new" text:style-name="Internet_20_link" text:visited-style-name="Visited_20_Internet_20_Link">Bartosz król</text:a>3 lata temu na stronie <text:s/>Google</text:p>
      <text:p text:style-name="P3">5/5</text:p>
      <text:p text:style-name="P3">Profesjonalna obsługa. Polecam !</text:p>
      <text:p text:style-name="Text_20_body">Odpowiedź właściciela 3 lata temu</text:p>
      <text:p text:style-name="Text_20_body">Bardzo dziękujemy za 5 gwiazdek i zapraszamy do ponownego korzystania z naszych usług. Do zobaczenia</text:p>
      <text:p text:style-name="Text_20_body"/>
      <text:p text:style-name="P3"><text:a xlink:type="simple" xlink:href="https://www.google.com/maps/contrib/115799726757790586855?hl=pl" office:target-frame-name="_blank" xlink:show="new" text:style-name="Internet_20_link" text:visited-style-name="Visited_20_Internet_20_Link">Ja kub</text:a>3 lata temu na stronie <text:s/>Google</text:p>
      <text:p text:style-name="P3">5/5</text:p>
      <text:p text:style-name="P3">Polecam wszystkim!</text:p>
      <text:p text:style-name="Text_20_body">Odpowiedź właściciela 3 lata temu</text:p>
      <text:p text:style-name="Text_20_body">Bardzo dziękujemy za 5 gwiazdek.</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9M31S</meta:editing-duration>
    <meta:editing-cycles>4</meta:editing-cycles>
    <meta:generator>OpenOffice/4.1.16$Win32 OpenOffice.org_project/4116m3$Build-9816</meta:generator>
    <dc:date>2026-05-13T13:42:28.22</dc:date>
    <dc:creator>Tomasz Domagalski</dc:creator>
    <meta:document-statistic meta:table-count="0" meta:image-count="0" meta:object-count="0" meta:page-count="5" meta:paragraph-count="139" meta:word-count="1208" meta:character-count="8467"/>
    <meta:user-defined meta:name="Info 1"/>
    <meta:user-defined meta:name="Info 2"/>
    <meta:user-defined meta:name="Info 3"/>
    <meta:user-defined meta:name="Info 4"/>
  </office:meta>
</office:document-meta>
</file>